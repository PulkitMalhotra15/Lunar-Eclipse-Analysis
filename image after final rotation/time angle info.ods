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hairavi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ime second</text:p>
          </table:table-cell>
          <table:table-cell office:value-type="string" calcext:value-type="string">
            <text:p>anglerotation</text:p>
          </table:table-cell>
          <table:table-cell office:value-type="string" calcext:value-type="string">
            <text:p>image no</text:p>
          </table:table-cell>
          <table:table-cell/>
          <table:table-cell office:value-type="string" calcext:value-type="string">
            <text:p>Time second</text:p>
          </table:table-cell>
          <table:table-cell office:value-type="string" calcext:value-type="string">
            <text:p>anglerotation</text:p>
          </table:table-cell>
          <table:table-cell office:value-type="string" calcext:value-type="string">
            <text:p>image no</text:p>
          </table:table-cell>
          <table:table-cell/>
          <table:table-cell office:value-type="string" calcext:value-type="string">
            <text:p>Time second</text:p>
          </table:table-cell>
          <table:table-cell office:value-type="string" calcext:value-type="string">
            <text:p>anglerotation</text:p>
          </table:table-cell>
          <table:table-cell office:value-type="string" calcext:value-type="string">
            <text:p>image no</text:p>
          </table:table-cell>
          <table:table-cell/>
          <table:table-cell office:value-type="string" calcext:value-type="string">
            <text:p>Time second</text:p>
          </table:table-cell>
          <table:table-cell office:value-type="string" calcext:value-type="string">
            <text:p>anglerotation</text:p>
          </table:table-cell>
          <table:table-cell office:value-type="string" calcext:value-type="string">
            <text:p>image no</text:p>
          </table:table-cell>
        </table:table-row>
        <table:table-row table:style-name="ro1">
          <table:table-cell office:value-type="float" office:value="1532691084" calcext:value-type="float">
            <text:p>153269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-0</text:p>
          </table:table-cell>
          <table:table-cell/>
          <table:table-cell office:value-type="float" office:value="1532691000" calcext:value-type="float">
            <text:p>153269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-3</text:p>
          </table:table-cell>
          <table:table-cell/>
          <table:table-cell office:value-type="float" office:value="1532690890" calcext:value-type="float">
            <text:p>1532690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0</text:p>
          </table:table-cell>
          <table:table-cell/>
          <table:table-cell office:value-type="float" office:value="1532691185" calcext:value-type="float">
            <text:p>1532691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B-0</text:p>
          </table:table-cell>
        </table:table-row>
        <table:table-row table:style-name="ro1">
          <table:table-cell office:value-type="float" office:value="1532691869" calcext:value-type="float">
            <text:p>1532691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-10</text:p>
          </table:table-cell>
          <table:table-cell/>
          <table:table-cell office:value-type="float" office:value="1532691769" calcext:value-type="float">
            <text:p>153269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-10</text:p>
          </table:table-cell>
          <table:table-cell/>
          <table:table-cell office:value-type="float" office:value="1532691939" calcext:value-type="float">
            <text:p>1532691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10</text:p>
          </table:table-cell>
          <table:table-cell/>
          <table:table-cell office:value-type="float" office:value="1532692250" calcext:value-type="float">
            <text:p>153269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B-10</text:p>
          </table:table-cell>
        </table:table-row>
        <table:table-row table:style-name="ro1">
          <table:table-cell office:value-type="float" office:value="1532693426" calcext:value-type="float">
            <text:p>1532693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-20</text:p>
          </table:table-cell>
          <table:table-cell/>
          <table:table-cell office:value-type="float" office:value="1532693288" calcext:value-type="float">
            <text:p>153269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-21</text:p>
          </table:table-cell>
          <table:table-cell/>
          <table:table-cell office:value-type="float" office:value="1532693730" calcext:value-type="float">
            <text:p>1532693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20</text:p>
          </table:table-cell>
          <table:table-cell/>
          <table:table-cell office:value-type="float" office:value="1532693116" calcext:value-type="float">
            <text:p>1532693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B-21</text:p>
          </table:table-cell>
        </table:table-row>
        <table:table-row table:style-name="ro1">
          <table:table-cell office:value-type="float" office:value="1532695221" calcext:value-type="float">
            <text:p>1532695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-30</text:p>
          </table:table-cell>
          <table:table-cell/>
          <table:table-cell office:value-type="float" office:value="1532695005" calcext:value-type="float">
            <text:p>1532695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-31</text:p>
          </table:table-cell>
          <table:table-cell/>
          <table:table-cell office:value-type="float" office:value="1532694754" calcext:value-type="float">
            <text:p>1532694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-30</text:p>
          </table:table-cell>
          <table:table-cell/>
          <table:table-cell office:value-type="float" office:value="1532694247" calcext:value-type="float">
            <text:p>1532694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B-30</text:p>
          </table:table-cell>
        </table:table-row>
        <table:table-row table:style-name="ro1">
          <table:table-cell office:value-type="float" office:value="1532696802" calcext:value-type="float">
            <text:p>1532696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-40</text:p>
          </table:table-cell>
          <table:table-cell/>
          <table:table-cell office:value-type="float" office:value="1532696343" calcext:value-type="float">
            <text:p>1532696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-40</text:p>
          </table:table-cell>
          <table:table-cell/>
          <table:table-cell office:value-type="float" office:value="1532695933" calcext:value-type="float">
            <text:p>1532695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-40</text:p>
          </table:table-cell>
          <table:table-cell/>
          <table:table-cell office:value-type="float" office:value="1532695933" calcext:value-type="float">
            <text:p>1532695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-40</text:p>
          </table:table-cell>
        </table:table-row>
        <table:table-row table:style-name="ro1">
          <table:table-cell office:value-type="float" office:value="1532697067" calcext:value-type="float">
            <text:p>1532697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-42</text:p>
          </table:table-cell>
          <table:table-cell/>
          <table:table-cell office:value-type="float" office:value="1532698045" calcext:value-type="float">
            <text:p>1532698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-50</text:p>
          </table:table-cell>
          <table:table-cell/>
          <table:table-cell office:value-type="float" office:value="1532696939" calcext:value-type="float">
            <text:p>1532696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-46</text:p>
          </table:table-cell>
          <table:table-cell/>
          <table:table-cell office:value-type="float" office:value="1532696939" calcext:value-type="float">
            <text:p>15326969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-46</text:p>
          </table:table-cell>
        </table:table-row>
        <table:table-row table:style-name="ro1">
          <table:table-cell office:value-type="float" office:value="1532697592" calcext:value-type="float">
            <text:p>15326975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-44</text:p>
          </table:table-cell>
          <table:table-cell/>
          <table:table-cell office:value-type="float" office:value="1532698770" calcext:value-type="float">
            <text:p>1532698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-53</text:p>
          </table:table-cell>
          <table:table-cell/>
          <table:table-cell office:value-type="float" office:value="1532697874" calcext:value-type="float">
            <text:p>1532697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=54</text:p>
          </table:table-cell>
          <table:table-cell/>
          <table:table-cell office:value-type="float" office:value="1532698695" calcext:value-type="float">
            <text:p>15326986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B-58</text:p>
          </table:table-cell>
        </table:table-row>
        <table:table-row table:style-name="ro1">
          <table:table-cell office:value-type="float" office:value="1532698455" calcext:value-type="float">
            <text:p>15326984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-47</text:p>
          </table:table-cell>
          <table:table-cell/>
          <table:table-cell office:value-type="float" office:value="1532701704" calcext:value-type="float">
            <text:p>15327017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R-56</text:p>
          </table:table-cell>
          <table:table-cell/>
          <table:table-cell office:value-type="float" office:value="1532698695" calcext:value-type="float">
            <text:p>15326986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=-58</text:p>
          </table:table-cell>
          <table:table-cell/>
          <table:table-cell office:value-type="float" office:value="1532699180" calcext:value-type="float">
            <text:p>15326991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B-61</text:p>
          </table:table-cell>
        </table:table-row>
        <table:table-row table:style-name="ro1">
          <table:table-cell office:value-type="float" office:value="1532698487" calcext:value-type="float">
            <text:p>15326984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-48</text:p>
          </table:table-cell>
          <table:table-cell/>
          <table:table-cell office:value-type="float" office:value="1532702161" calcext:value-type="float">
            <text:p>1532702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-57</text:p>
          </table:table-cell>
          <table:table-cell/>
          <table:table-cell office:value-type="float" office:value="1532699138" calcext:value-type="float">
            <text:p>1532699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-60</text:p>
          </table:table-cell>
          <table:table-cell/>
          <table:table-cell office:value-type="float" office:value="1532702060" calcext:value-type="float">
            <text:p>15327020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B-63</text:p>
          </table:table-cell>
        </table:table-row>
        <table:table-row table:style-name="ro1">
          <table:table-cell office:value-type="float" office:value="1532698879" calcext:value-type="float">
            <text:p>153269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-50</text:p>
          </table:table-cell>
          <table:table-cell/>
          <table:table-cell office:value-type="float" office:value="1532705511" calcext:value-type="float">
            <text:p>15327055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-60</text:p>
          </table:table-cell>
          <table:table-cell/>
          <table:table-cell office:value-type="float" office:value="1532705204" calcext:value-type="float">
            <text:p>15327052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-70</text:p>
          </table:table-cell>
          <table:table-cell/>
          <table:table-cell office:value-type="float" office:value="1532705204" calcext:value-type="float">
            <text:p>15327052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B-70</text:p>
          </table:table-cell>
        </table:table-row>
        <table:table-row table:style-name="ro1">
          <table:table-cell office:value-type="float" office:value="1532701874" calcext:value-type="float">
            <text:p>1532701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-53</text:p>
          </table:table-cell>
          <table:table-cell/>
          <table:table-cell office:value-type="float" office:value="1532707705" calcext:value-type="float">
            <text:p>15327077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-73</text:p>
          </table:table-cell>
          <table:table-cell/>
          <table:table-cell office:value-type="float" office:value="1532708735" calcext:value-type="float">
            <text:p>15327087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-87</text:p>
          </table:table-cell>
          <table:table-cell/>
          <table:table-cell office:value-type="float" office:value="1532707457" calcext:value-type="float">
            <text:p>15327074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B-81</text:p>
          </table:table-cell>
        </table:table-row>
        <table:table-row table:style-name="ro1">
          <table:table-cell office:value-type="float" office:value="1532702236" calcext:value-type="float">
            <text:p>1532702236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Bl-56</text:p>
          </table:table-cell>
          <table:table-cell/>
          <table:table-cell office:value-type="float" office:value="1532708899" calcext:value-type="float">
            <text:p>15327088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-82</text:p>
          </table:table-cell>
          <table:table-cell/>
          <table:table-cell office:value-type="float" office:value="1532712291" calcext:value-type="float">
            <text:p>15327122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-100</text:p>
          </table:table-cell>
          <table:table-cell/>
          <table:table-cell office:value-type="float" office:value="1532709170" calcext:value-type="float">
            <text:p>15327091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B-90</text:p>
          </table:table-cell>
        </table:table-row>
        <table:table-row table:style-name="ro1">
          <table:table-cell office:value-type="float" office:value="1532703113" calcext:value-type="float">
            <text:p>1532703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-58</text:p>
          </table:table-cell>
          <table:table-cell/>
          <table:table-cell office:value-type="float" office:value="1532709903" calcext:value-type="float">
            <text:p>15327099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-90</text:p>
          </table:table-cell>
          <table:table-cell table:number-columns-repeated="5"/>
          <table:table-cell office:value-type="float" office:value="1532712291" calcext:value-type="float">
            <text:p>15327122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-100</text:p>
          </table:table-cell>
        </table:table-row>
        <table:table-row table:style-name="ro1">
          <table:table-cell office:value-type="float" office:value="1532705669" calcext:value-type="float">
            <text:p>15327056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-60</text:p>
          </table:table-cell>
          <table:table-cell/>
          <table:table-cell office:value-type="float" office:value="1532712019" calcext:value-type="float">
            <text:p>153271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R-100</text:p>
          </table:table-cell>
          <table:table-cell table:number-columns-repeated="8"/>
        </table:table-row>
        <table:table-row table:style-name="ro1">
          <table:table-cell office:value-type="float" office:value="1532707309" calcext:value-type="float">
            <text:p>15327073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-69</text:p>
          </table:table-cell>
          <table:table-cell table:number-columns-repeated="12"/>
        </table:table-row>
        <table:table-row table:style-name="ro1">
          <table:table-cell office:value-type="float" office:value="1532708545" calcext:value-type="float">
            <text:p>15327085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-79</text:p>
          </table:table-cell>
          <table:table-cell table:number-columns-repeated="12"/>
        </table:table-row>
        <table:table-row table:style-name="ro1">
          <table:table-cell office:value-type="float" office:value="1532709903" calcext:value-type="float">
            <text:p>15327099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-90</text:p>
          </table:table-cell>
          <table:table-cell table:number-columns-repeated="12"/>
        </table:table-row>
        <table:table-row table:style-name="ro1">
          <table:table-cell office:value-type="float" office:value="1532712019" calcext:value-type="float">
            <text:p>153271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-100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R-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R-30</text:p>
          </table:table-cell>
          <table:table-cell table:number-columns-repeated="10"/>
        </table:table-row>
      </table:table>
      <table:table table:name="Pulki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 second</text:p>
          </table:table-cell>
          <table:table-cell office:value-type="string" calcext:value-type="string">
            <text:p>anglerotation</text:p>
          </table:table-cell>
          <table:table-cell office:value-type="string" calcext:value-type="string">
            <text:p>image no</text:p>
          </table:table-cell>
        </table:table-row>
        <table:table-row table:style-name="ro1">
          <table:table-cell office:value-type="float" office:value="1532691084" calcext:value-type="float">
            <text:p>153269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1</text:p>
          </table:table-cell>
        </table:table-row>
        <table:table-row table:style-name="ro1">
          <table:table-cell office:value-type="float" office:value="1532691869" calcext:value-type="float">
            <text:p>1532691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10</text:p>
          </table:table-cell>
        </table:table-row>
        <table:table-row table:style-name="ro1">
          <table:table-cell office:value-type="float" office:value="1532693426" calcext:value-type="float">
            <text:p>1532693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20</text:p>
          </table:table-cell>
        </table:table-row>
        <table:table-row table:style-name="ro1">
          <table:table-cell office:value-type="float" office:value="1532695221" calcext:value-type="float">
            <text:p>1532695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30</text:p>
          </table:table-cell>
        </table:table-row>
        <table:table-row table:style-name="ro1">
          <table:table-cell office:value-type="float" office:value="1532696802" calcext:value-type="float">
            <text:p>1532696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 40</text:p>
          </table:table-cell>
        </table:table-row>
        <table:table-row table:style-name="ro1">
          <table:table-cell office:value-type="float" office:value="1532698504" calcext:value-type="float">
            <text:p>15326985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49</text:p>
          </table:table-cell>
        </table:table-row>
        <table:table-row table:style-name="ro1">
          <table:table-cell office:value-type="float" office:value="1532698911" calcext:value-type="float">
            <text:p>15326989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51</text:p>
          </table:table-cell>
        </table:table-row>
        <table:table-row table:style-name="ro1">
          <table:table-cell office:value-type="float" office:value="1532707148" calcext:value-type="float">
            <text:p>15327071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80</text:p>
          </table:table-cell>
        </table:table-row>
        <table:table-row table:style-name="ro1">
          <table:table-cell office:value-type="float" office:value="1532707148" calcext:value-type="float">
            <text:p>15327071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85</text:p>
          </table:table-cell>
        </table:table-row>
        <table:table-row table:style-name="ro1">
          <table:table-cell office:value-type="float" office:value="1532705669" calcext:value-type="float">
            <text:p>15327056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46.16mm" svg:y="181.62mm">
            <draw:object draw:notify-on-update-of-ranges="Sheet3.A1:Sheet3.A57 Sheet3.B1:Sheet3.B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532690890" calcext:value-type="float">
            <text:p>1532690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1000" calcext:value-type="float">
            <text:p>153269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1084" calcext:value-type="float">
            <text:p>153269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1185" calcext:value-type="float">
            <text:p>153269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1769" calcext:value-type="float">
            <text:p>153269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1869" calcext:value-type="float">
            <text:p>153269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1939" calcext:value-type="float">
            <text:p>153269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2250" calcext:value-type="float">
            <text:p>153269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3116" calcext:value-type="float">
            <text:p>153269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3288" calcext:value-type="float">
            <text:p>153269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3426" calcext:value-type="float">
            <text:p>1532693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3730" calcext:value-type="float">
            <text:p>1532693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4247" calcext:value-type="float">
            <text:p>1532694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94754" calcext:value-type="float">
            <text:p>1532694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695005" calcext:value-type="float">
            <text:p>1532695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695221" calcext:value-type="float">
            <text:p>1532695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695933" calcext:value-type="float">
            <text:p>1532695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695933" calcext:value-type="float">
            <text:p>1532695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696343" calcext:value-type="float">
            <text:p>1532696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696802" calcext:value-type="float">
            <text:p>1532696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696939" calcext:value-type="float">
            <text:p>15326969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2696939" calcext:value-type="float">
            <text:p>1532696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697067" calcext:value-type="float">
            <text:p>1532697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2697592" calcext:value-type="float">
            <text:p>1532697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697874" calcext:value-type="float">
            <text:p>15326978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2698045" calcext:value-type="float">
            <text:p>1532698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2698455" calcext:value-type="float">
            <text:p>15326984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2698487" calcext:value-type="float">
            <text:p>15326984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2698695" calcext:value-type="float">
            <text:p>15326986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2698695" calcext:value-type="float">
            <text:p>15326986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698770" calcext:value-type="float">
            <text:p>1532698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2698879" calcext:value-type="float">
            <text:p>15326988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2699138" calcext:value-type="float">
            <text:p>1532699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2699180" calcext:value-type="float">
            <text:p>15326991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2701704" calcext:value-type="float">
            <text:p>1532701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2701874" calcext:value-type="float">
            <text:p>1532701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2702060" calcext:value-type="float">
            <text:p>15327020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2702161" calcext:value-type="float">
            <text:p>15327021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2702236" calcext:value-type="float">
            <text:p>15327022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2703113" calcext:value-type="float">
            <text:p>15327031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2705204" calcext:value-type="float">
            <text:p>1532705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2705204" calcext:value-type="float">
            <text:p>1532705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2705511" calcext:value-type="float">
            <text:p>15327055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2705669" calcext:value-type="float">
            <text:p>15327056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2707309" calcext:value-type="float">
            <text:p>15327073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2707457" calcext:value-type="float">
            <text:p>15327074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2707705" calcext:value-type="float">
            <text:p>15327077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2708545" calcext:value-type="float">
            <text:p>15327085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2708735" calcext:value-type="float">
            <text:p>15327087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2708899" calcext:value-type="float">
            <text:p>15327088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2709170" calcext:value-type="float">
            <text:p>15327091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2709903" calcext:value-type="float">
            <text:p>15327099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2709903" calcext:value-type="float">
            <text:p>1532709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2712019" calcext:value-type="float">
            <text:p>153271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2712019" calcext:value-type="float">
            <text:p>153271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2712291" calcext:value-type="float">
            <text:p>15327122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2712291" calcext:value-type="float">
            <text:p>1532712291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C Langrenus</text:p>
          </table:table-cell>
          <table:table-cell office:value-type="float" office:value="397" calcext:value-type="float">
            <text:p>397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 Copernicus </text:p>
          </table:table-cell>
          <table:table-cell office:value-type="float" office:value="160" calcext:value-type="float">
            <text:p>160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 Aristarchus 102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 Kepler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 Grimaldi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3.A1:Sheet3.B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7:23:04.534631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9:39.794398988</meta:creation-date>
    <dc:date>2019-04-17T18:59:49.526394978</dc:date>
    <meta:editing-duration>PT45M15S</meta:editing-duration>
    <meta:editing-cycles>8</meta:editing-cycles>
    <meta:generator>LibreOffice/6.0.7.3$Linux_X86_64 LibreOffice_project/00m0$Build-3</meta:generator>
    <meta:document-statistic meta:table-count="4" meta:cell-count="3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3.A1:Sheet3.B57" svg:x="0.32cm" svg:y="0.18cm" svg:width="12.508cm" svg:height="8.64cm">
          <chartooo:coordinate-region svg:x="1.247cm" svg:y="0.379cm" svg:width="10.6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57" chart:class="chart:scatter">
            <chart:domain table:cell-range-address="Sheet3.A1:Sheet3.A57"/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2690890">
                <text:p>1532690890</text:p>
                <draw:g>
                  <svg:desc>Sheet3.A1:Sheet3.A57</svg:desc>
                </draw:g>
              </table:table-cell>
              <table:table-cell office:value-type="float" office:value="0">
                <text:p>0</text:p>
                <draw:g>
                  <svg:desc>Sheet3.B1:Sheet3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2691000">
                <text:p>153269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2691084">
                <text:p>153269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2691185">
                <text:p>153269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2691769">
                <text:p>153269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2691869">
                <text:p>153269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2691939">
                <text:p>153269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2692250">
                <text:p>153269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2693116">
                <text:p>153269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2693288">
                <text:p>153269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2693426">
                <text:p>153269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2693730">
                <text:p>1532693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2694247">
                <text:p>1532694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2694754">
                <text:p>1532694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2695005">
                <text:p>1532695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2695221">
                <text:p>1532695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2695933">
                <text:p>1532695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2695933">
                <text:p>1532695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2696343">
                <text:p>1532696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2696802">
                <text:p>1532696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2696939">
                <text:p>1532696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2696939">
                <text:p>1532696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2697067">
                <text:p>1532697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2697592">
                <text:p>1532697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2697874">
                <text:p>15326978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2698045">
                <text:p>1532698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2698455">
                <text:p>15326984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2698487">
                <text:p>15326984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2698695">
                <text:p>15326986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2698695">
                <text:p>15326986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2698770">
                <text:p>1532698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2698879">
                <text:p>15326988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2699138">
                <text:p>1532699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2699180">
                <text:p>1532699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2701704">
                <text:p>1532701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2701874">
                <text:p>15327018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2702060">
                <text:p>15327020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2702161">
                <text:p>1532702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32702236">
                <text:p>1532702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32703113">
                <text:p>15327031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32705204">
                <text:p>1532705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2705204">
                <text:p>1532705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32705511">
                <text:p>15327055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2705669">
                <text:p>1532705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32707309">
                <text:p>15327073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32707457">
                <text:p>15327074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2707705">
                <text:p>15327077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2708545">
                <text:p>15327085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2708735">
                <text:p>15327087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2708899">
                <text:p>15327088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2709170">
                <text:p>15327091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2709903">
                <text:p>1532709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2709903">
                <text:p>1532709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2712019">
                <text:p>15327120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2712019">
                <text:p>15327120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2712291">
                <text:p>1532712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2712291">
                <text:p>153271229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